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f4735"/>
    </style:style>
    <style:style style:name="P5" style:family="paragraph" style:parent-style-name="Preformatted_20_Text">
      <style:paragraph-properties fo:margin-top="0in" fo:margin-bottom="0.1965in" style:contextual-spacing="false"/>
      <style:text-properties fo:font-style="italic" fo:font-weight="bold" officeooo:rsid="001f4735" officeooo:paragraph-rsid="0020af90" style:font-style-asian="italic" style:font-weight-asian="bold" style:font-style-complex="italic" style:font-weight-complex="bold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20a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Clone Kali's live-build repository:</text:p>
      <text:p text:style-name="Preformatted_20_Text"><text:span text:style-name="Source_20_Text">git clone https://gitlab.com/kalilinux/build-scripts/live-build-config.git</text:span></text:p>
      <text:p text:style-name="P2"><text:span text:style-name="Source_20_Text">cd live-build-config</text:span></text:p>
      <text:p text:style-name="P1">Configure a minimal package list:</text:p>
      <text:p text:style-name="P3">Create:</text:p>
      <text:p text:style-name="P2"><text:span text:style-name="Source_20_Text">mkdir -p kali-config/variant-minimal/package-lists</text:span></text:p>
      <text:p text:style-name="P3">Example package list:</text:p>
      <text:p text:style-name="Preformatted_20_Text"><text:span text:style-name="Source_20_Text">cat &gt; kali-config/variant-minimal/package-lists/minimal.list.chroot &lt;&lt; EOF</text:span></text:p>
      <text:p text:style-name="Preformatted_20_Text"><text:span text:style-name="Source_20_Text">kali-linux-core</text:span></text:p>
      <text:p text:style-name="Preformatted_20_Text"><text:span text:style-name="Source_20_Text">linux-image-amd64</text:span></text:p>
      <text:p text:style-name="Preformatted_20_Text"><text:span text:style-name="Source_20_Text">live-boot</text:span></text:p>
      <text:p text:style-name="Preformatted_20_Text"><text:span text:style-name="Source_20_Text">systemd</text:span></text:p>
      <text:p text:style-name="P2"><text:span text:style-name="Source_20_Text">EOF</text:span></text:p>
      <text:p text:style-name="P3">Build:</text:p>
      <text:p text:style-name="Preformatted_20_Text"><text:span text:style-name="Source_20_Text">./build.sh \</text:span></text:p>
      <text:p text:style-name="Preformatted_20_Text"><text:span text:style-name="Source_20_Text"><text:s text:c="4"/>--variant minimal \</text:span></text:p>
      <text:p text:style-name="P4"><text:span text:style-name="Source_20_Text"><text:s text:c="4"/>--verbose</text:span></text:p>
      <text:p text:style-name="P5">for this you need to install live-build to run build.sh </text:p>
      <text:p text:style-name="P6">sudo apt-get update &amp;&amp; sudo apt-get -y install live-build</text:p>
      <text:p text:style-name="P3">Or manually:</text:p>
      <text:p text:style-name="Preformatted_20_Text"><text:span text:style-name="Source_20_Text">lb clean</text:span></text:p>
      <text:p text:style-name="Preformatted_20_Text"><text:span text:style-name="Source_20_Text">lb config</text:span></text:p>
      <text:p text:style-name="P2"><text:span text:style-name="Source_20_Text">lb build</text:span></text:p>
      <text:p text:style-name="P3">The resulting ISO appears in:</text:p>
      <text:p text:style-name="P2"><text:span text:style-name="Source_20_Text">images/</text:span></text:p>
      <text:p text:style-name="P3">or</text:p>
      <text:p text:style-name="P2"><text:span text:style-name="Source_20_Text">live-image-amd64.hybrid.iso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14:29:22.528944945</meta:creation-date>
    <dc:date>2026-06-15T14:34:56.098743841</dc:date>
    <meta:editing-duration>PT5M32S</meta:editing-duration>
    <meta:editing-cycles>3</meta:editing-cycles>
    <meta:generator>LibreOffice/26.2.4.2$Linux_X86_64 LibreOffice_project/620$Build-2</meta:generator>
    <meta:document-statistic meta:table-count="0" meta:image-count="0" meta:object-count="0" meta:page-count="1" meta:paragraph-count="27" meta:word-count="75" meta:character-count="634" meta:non-whitespace-character-count="579"/>
  </office:meta>
</office:document-meta>
</file>